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B000002AE7B63BA9F.png" manifest:media-type="image/png"/>
  <manifest:file-entry manifest:full-path="Pictures/10000001000001CB000001335CC0F4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00062e" style:font-size-asian="12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7" style:family="paragraph" style:parent-style-name="Standard"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13pt" style:font-size-asian="13pt" style:font-size-complex="13pt" style:font-weight-complex="bold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f92672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6" style:family="text">
      <style:text-properties fo:color="#bbbbbb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7" style:family="text">
      <style:text-properties fo:color="#ffff00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8" style:family="text">
      <style:text-properties fo:color="#c74ded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9" style:family="text">
      <style:text-properties fo:color="#f39c12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0" style:family="text">
      <style:text-properties fo:color="#a0a1a7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1" style:family="text">
      <style:text-properties fo:color="#ee5d43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0062e" style:font-weight-asian="normal" style:font-weight-complex="normal"/>
    </style:style>
    <style:style style:name="T14" style:family="text">
      <style:text-properties fo:font-weight="normal" officeooo:rsid="0000f9c3" style:font-weight-asian="normal" style:font-weight-complex="normal"/>
    </style:style>
    <style:style style:name="T15" style:family="text">
      <style:text-properties fo:font-weight="normal" officeooo:rsid="000113ef" style:font-weight-asian="normal" style:font-weight-complex="normal"/>
    </style:style>
    <style:style style:name="T16" style:family="text">
      <style:text-properties fo:font-weight="normal" officeooo:rsid="0005890f" style:font-weight-asian="normal" style:font-weight-complex="normal"/>
    </style:style>
    <style:style style:name="T17" style:family="text">
      <style:text-properties officeooo:rsid="000113ef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00062e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1831e" style:font-weight-asian="bold" style:font-weight-complex="bold"/>
    </style:style>
    <style:style style:name="T22" style:family="text">
      <style:text-properties style:font-weight-complex="bold"/>
    </style:style>
    <style:style style:name="T23" style:family="text">
      <style:text-properties officeooo:rsid="0000062e" style:font-weight-complex="bold"/>
    </style:style>
    <style:style style:name="T24" style:family="text">
      <style:text-properties officeooo:rsid="000183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squisa sobre CSS — João Victor Felix</text:p>
      <text:p text:style-name="P5">Box Model: </text:p>
      <text:p text:style-name="P1">O box model é uma parte fundamental pois ele contém todos os elementos do html como se os mesmos ficassem presos dentro de várias caixas/partes, sendo elas o content, padding, borders e margins.</text:p>
      <text:p text:style-name="P1"><text:span text:style-name="T18">Content: </text:span>O conteúdo dentro da caixa, sendo onde fica os textos e imagens</text:p>
      <text:p text:style-name="P1"><text:span text:style-name="T18">Padding: </text:span>Área limpa envolta do conteúdo, sendo como um espaçamento/preenchimento transparente ou vazio.</text:p>
      <text:p text:style-name="P1"><text:span text:style-name="T18">Border: </text:span>Uma borda envolta do padding e do conteúdo.</text:p>
      <text:p text:style-name="P1"><text:span text:style-name="T18">Margin: </text:span>Uma margem externa envolta da borda que também é transparente.</text:p>
      <text:p text:style-name="P3"><draw:frame draw:style-name="fr2" draw:name="Imagem 1" text:anchor-type="char" svg:x="1.127cm" svg:y="0.014cm" svg:width="12.735cm" svg:height="8.518cm" draw:z-index="0"><draw:image xlink:href="Pictures/10000001000001CB000001335CC0F477.png" xlink:type="simple" xlink:show="embed" xlink:actuate="onLoad" draw:mime-type="image/png"/></draw:frame><text:span text:style-name="T18">Exemplos:</text:span></text:p>
      <text:p text:style-name="P6" loext:marker-style-name="T6"><text:span text:style-name="T5">div</text:span><text:span text:style-name="T6"> </text:span><text:span text:style-name="T7">{</text:span></text:p>
      <text:p text:style-name="P6" loext:marker-style-name="T6"><text:span text:style-name="T6">  </text:span><text:span text:style-name="T8">width</text:span><text:span text:style-name="T6">: </text:span><text:span text:style-name="T9">300px</text:span><text:span text:style-name="T6">; </text:span><text:span text:style-name="T10">/*Largura da borda da Div*/</text:span></text:p>
      <text:p text:style-name="P6" loext:marker-style-name="T6"><text:span text:style-name="T6">  </text:span><text:span text:style-name="T8">border</text:span><text:span text:style-name="T6">: </text:span><text:span text:style-name="T9">15px</text:span><text:span text:style-name="T6"> </text:span><text:span text:style-name="T11">solid</text:span><text:span text:style-name="T6"> </text:span><text:span text:style-name="T11">orange</text:span><text:span text:style-name="T6">; </text:span><text:span text:style-name="T10">/*Espessura da linha da borda*/</text:span></text:p>
      <text:p text:style-name="P6" loext:marker-style-name="T6"><text:span text:style-name="T6">  </text:span><text:span text:style-name="T8">padding</text:span><text:span text:style-name="T6">: </text:span><text:span text:style-name="T9">40px</text:span><text:span text:style-name="T6">; </text:span><text:span text:style-name="T10">/*Espaço limpo de 40px entre o content e a borda*/</text:span></text:p>
      <text:p text:style-name="P6" loext:marker-style-name="T6"><text:span text:style-name="T6">  </text:span><text:span text:style-name="T8">margin</text:span><text:span text:style-name="T6">: </text:span><text:span text:style-name="T9">20px</text:span><text:span text:style-name="T6">; </text:span><text:span text:style-name="T10">/*Margem externa que serve para manter um espaçamento</text:span></text:p>
      <text:p text:style-name="P6" loext:marker-style-name="T6"><text:span text:style-name="T10">  entre a borda e os elementos externos*/</text:span><text:span text:style-name="T7">}</text:span></text:p>
      <text:p text:style-name="P7" loext:marker-style-name="T4"><draw:frame draw:style-name="fr1" draw:name="Figura1" text:anchor-type="char" svg:x="-0.095cm" svg:y="0.192cm" svg:width="13.69cm" svg:height="6.32cm" draw:z-index="1"><draw:image xlink:href="Pictures/100000000000054B000002AE7B63BA9F.png" xlink:type="simple" xlink:show="embed" xlink:actuate="onLoad" draw:mime-type="image/png"/></draw:frame></text:p>
      <text:p text:style-name="Standard" loext:marker-style-name="T4"><text:span text:style-name="T4"/></text:p>
      <text:p text:style-name="P7" loext:marker-style-name="T4"/>
      <text:p text:style-name="P7" loext:marker-style-name="T4"/>
      <text:p text:style-name="Standard" loext:marker-style-name="T2"><text:soft-page-break/><text:span text:style-name="T2">Width e Height:</text:span></text:p>
      <text:p text:style-name="P1"><text:span text:style-name="T18">Width: </text:span><text:span text:style-name="T22">Largura de um objeto, como a de uma div ou imagem por exemplo.</text:span></text:p>
      <text:p text:style-name="P1"><text:span text:style-name="T18">Height: </text:span><text:span text:style-name="T22">Altura de um objeto.</text:span></text:p>
      <text:p text:style-name="P1"><text:span text:style-name="T18">Min-Width: </text:span><text:span text:style-name="T22">Largura mínima que um objeto na página pode alcançar, fazendo com que caso a página seja minimizada ou diminuída, uma imagem por exemplo pode reduzir até tamanho “x”, ficando mais responsivo.</text:span></text:p>
      <text:p text:style-name="P1"><text:span text:style-name="T18">Max-Width: </text:span><text:span text:style-name="T22">Largura máxima que um objeto pode alcançar, sendo um limite que garante que o objeto, como uma barra de navegação por exemplo, não se expanda o suficiente para que suma da tela.</text:span><text:span text:style-name="T18"> </text:span></text:p>
      <text:p text:style-name="P1"><text:span text:style-name="T18">Min-Height: </text:span><text:span text:style-name="T22">Altura mínima que um objeto na página pode alcançar, fazendo com que caso a página seja minimizada ou diminuída, uma imagem por exemplo pode reduzir sua altura até tamanho “x”.</text:span></text:p>
      <text:p text:style-name="P1"><text:span text:style-name="T18">Max-Height: </text:span><text:span text:style-name="T22">Altura máxima que um objeto pode alcançar, sendo um limite que garante que o objeto, como uma barra de navegação por exemplo, não se expanda o suficiente para que tampe algum outro objeto do website.</text:span></text:p>
      <text:p text:style-name="Standard" loext:marker-style-name="T4"><text:span text:style-name="T3"/></text:p>
      <text:p text:style-name="Standard" loext:marker-style-name="T2"><text:span text:style-name="T2">Propriedades de Medida:</text:span><text:span text:style-name="T2"/></text:p>
      <text:p text:style-name="P1"><text:span text:style-name="T18">Px: </text:span><text:span text:style-name="T22">Pixel’s da tela de um computador.</text:span></text:p>
      <text:p text:style-name="P2"><text:span text:style-name="T18">%: </text:span><text:span text:style-name="T22">porcentagem de escala da caixa/div, uma imagem com 50% de Height e Width ocupa </text:span><text:span text:style-name="T23">de</text:span><text:span text:style-name="T22"> </text:span><text:span text:style-name="T23">forma relativa ao elemento pai (metade do espaço total da div/caixa que ela está contida)</text:span><text:span text:style-name="T22">.</text:span></text:p>
      <text:p text:style-name="P1"><text:span text:style-name="T18">Vw: </text:span><text:span text:style-name="T13">Parecido com a porcentagem, sendo 1Vw como 1% da largura de um objeto que ocupa 1% do monitor por exemplo.</text:span><text:span text:style-name="T19"> </text:span><text:span text:style-name="T13">A diferença é que o Vw e Vh é relativo ao viewport </text:span><text:span text:style-name="T14">(Parte da página visível como um todo)</text:span><text:span text:style-name="T13"> e não ao elemento pai, ignorando o tamanho das divs/caixas do website.</text:span></text:p>
      <text:p text:style-name="P2"><text:span text:style-name="T18">Vh: </text:span><text:span text:style-name="T13"><text:s/>Parecido com a porcentagem, sendo 100Vw como a propriedade 100% da altura de um objeto que ocupa 100% do monitor, como uma barra lateral por exemplo.</text:span></text:p>
      <text:p text:style-name="P1"><text:span text:style-name="T18">Em: </text:span><text:span text:style-name="T12">É </text:span><text:span text:style-name="T15">relativo ao elemento atual que está inserido mas pode causar efeitos de escala acumulada dependendo do tamanho dos elementos. </text:span><text:span text:style-name="T16">Este é mais utilizado para elementos em geral.</text:span></text:p>
      <text:p text:style-name="P1"><text:span text:style-name="T18">Rem: </text:span><text:span text:style-name="T15">Também é relativo igual ao Em, mas diferente do mesmo, ele acaba sendo relativo ao elemento raiz do documento html, sendo mais previsível. </text:span><text:span text:style-name="T16">Este é mais utilizado para fontes.</text:span></text:p>
      <text:p text:style-name="Standard" loext:marker-style-name="T2"><text:soft-page-break/><text:span text:style-name="T1"><text:line-break/></text:span><text:span text:style-name="T2">Reset CSS: </text:span></text:p>
      <text:p text:style-name="P1">O que é: Uma forma de garantir que um usuário, ao acessar um website, não acabe sofrendo com formatações do próprio navegador que pode acabar causando inconsistências no site. </text:p>
      <text:p text:style-name="P1"><text:span text:style-name="T20">Objetivo </text:span><text:span text:style-name="T21">e consequência do não uso</text:span><text:span text:style-name="T20">:</text:span> Limpar/resetar toda e qualquer formatação do body, head, footer e etc. É <text:span text:style-name="T17">importante para que as formatações do navegador de quem acessa a página não atrapalhem as que foram definidas pelo programador. </text:span><text:span text:style-name="T24">Caso não haja reset pelo css, um navegador pode fazer com que os textos não tenham o tamanho ou fonte certa, imagens e elementos fiquem desalinhados e etc.</text:span></text:p>
      <text:p text:style-name="P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2.49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no</meta:initial-creator>
    <meta:editing-cycles>7</meta:editing-cycles>
    <meta:creation-date>2026-05-15T12:01:00</meta:creation-date>
    <dc:date>2026-05-17T19:35:50.391759084</dc:date>
    <meta:editing-duration>PT4H43M16S</meta:editing-duration>
    <meta:generator>LibreOffice/24.2.7.2$Linux_X86_64 LibreOffice_project/420$Build-2</meta:generator>
    <meta:document-statistic meta:table-count="0" meta:image-count="2" meta:object-count="0" meta:page-count="3" meta:paragraph-count="31" meta:word-count="565" meta:character-count="3332" meta:non-whitespace-character-count="2781"/>
    <meta:user-defined meta:name="AppVersion">16.0000</meta:user-defined>
    <meta:user-defined meta:name="Company">CPS</meta:user-defined>
    <meta:template xlink:type="simple" xlink:actuate="onRequest" xlink:title="Normal" xlink:href=""/>
  </office:meta>
</office:document-meta>
</file>